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4.46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<text:s text:c="27"/>AUSTIN AL-ANON GROUP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2222 AFG   Covenant Presbyterian Church</text:p>
            <text:p>  Online and in person, 3003 Northland Dr, Austin 78757 </text:p>
          </table:table-cell>
          <table:table-cell table:number-columns-repeated="4"/>
          <table:table-cell office:value-type="string" calcext:value-type="string">
            <text:p>6:00 Z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LLANDALE HAPPY HOUR AFG   St John's United Methodist Church</text:p>
            <text:p>  5908 Wynona Ave, Austin 78757 </text:p>
          </table:table-cell>
          <table:table-cell/>
          <table:table-cell office:value-type="string" calcext:value-type="string">
            <text:p>5:30 Z</text:p>
            <text:p/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OURAGE AND RECOVERY AFG   Austin Galano Club</text:p>
            <text:p>  6809 Guadalupe St, Austin 78752 </text:p>
          </table:table-cell>
          <table:table-cell table:number-columns-repeated="3"/>
          <table:table-cell office:value-type="string" calcext:value-type="string">
            <text:p>5:30 G</text:p>
            <text:p/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JUST FOR TODAY AFG   </text:p>
            <text:p>  Permanently meeting on Zoom, Austin 78701 </text:p>
          </table:table-cell>
          <table:table-cell table:number-columns-repeated="2"/>
          <table:table-cell office:value-type="string" calcext:value-type="string">
            <text:p>12:00 Z</text:p>
            <text:p/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NORTHLAND AFG   Suburban Foundation Northland Club</text:p>
            <text:p>  2809 Northland Dr, Austin 78757 </text:p>
          </table:table-cell>
          <table:table-cell/>
          <table:table-cell office:value-type="string" calcext:value-type="string">
            <text:p> 10:00am</text:p>
            <text:p> 8:00</text:p>
            <text:p/>
          </table:table-cell>
          <table:table-cell/>
          <table:table-cell office:value-type="string" calcext:value-type="string">
            <text:p> 10:00am</text:p>
            <text:p> 8:00</text:p>
            <text:p/>
          </table:table-cell>
          <table:table-cell/>
          <table:table-cell office:value-type="string" calcext:value-type="string">
            <text:p>10:00am</text:p>
            <text:p/>
          </table:table-cell>
          <table:table-cell office:value-type="string" calcext:value-type="string">
            <text:p> 12:00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THE TREE2 AFG   Beverly S. Sheffield Northwest Municipal Park</text:p>
            <text:p>  7000 Ardath St., Austin 78757   Meet under tree, bring a chair</text:p>
          </table:table-cell>
          <table:table-cell office:value-type="string" calcext:value-type="string">
            <text:p>12:00</text:p>
            <text:p/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ERENIDAD GFA   Sagrado Corazon Church</text:p>
            <text:p>  5909 Reicher Dr, Austin 78723 </text:p>
          </table:table-cell>
          <table:table-cell table:number-columns-repeated="4"/>
          <table:table-cell office:value-type="string" calcext:value-type="string">
            <text:p>7:00 E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AUSTIN MEN IN RECOVERY AFG   St Michael's Episcopal Church</text:p>
            <text:p>  1600 N Capital of Texas Hwy, Austin 78759 </text:p>
          </table:table-cell>
          <table:table-cell table:number-columns-repeated="2"/>
          <table:table-cell office:value-type="string" calcext:value-type="string">
            <text:p>7:30 Mo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GREAT HILLS PARENTS AFG   Triumphant Love Lutheran Church</text:p>
            <text:p>  9508 Great Hills Trl, Austin 78759 </text:p>
          </table:table-cell>
          <table:table-cell table:number-columns-repeated="4"/>
          <table:table-cell office:value-type="string" calcext:value-type="string">
            <text:p>7:30 Z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N</text:p>
          </table:table-cell>
          <table:table-cell office:value-type="string" calcext:value-type="string">
            <text:p>HILLTOPPERS AFG   Hillcrest Baptist Church</text:p>
            <text:p>  3838 Steck Ave, Austin 78759   Room 161</text:p>
          </table:table-cell>
          <table:table-cell/>
          <table:table-cell office:value-type="string" calcext:value-type="string">
            <text:p> 12:00 Nc</text:p>
            <text:p/>
          </table:table-cell>
          <table:table-cell table:number-columns-repeated="4"/>
          <table:table-cell office:value-type="string" calcext:value-type="string">
            <text:p>9:30am</text:p>
            <text:p>10:30am Wo</text:p>
            <text:p/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UBURBAN FRIENDS AFG   St. John's Church</text:p>
            <text:p>  11201 Parkfield Drive, Austin 78758 </text:p>
          </table:table-cell>
          <table:table-cell table:number-columns-repeated="6"/>
          <table:table-cell office:value-type="string" calcext:value-type="string">
            <text:p>12:00</text:p>
            <text:p/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THE TREE AFG   Hillcrest Baptist Church</text:p>
            <text:p>  3838 Steck Ave, Austin 78759   Meet under tree, bring a chair</text:p>
          </table:table-cell>
          <table:table-cell/>
          <table:table-cell office:value-type="string" calcext:value-type="string">
            <text:p> 12:00</text:p>
            <text:p/>
          </table:table-cell>
          <table:table-cell office:value-type="string" calcext:value-type="string">
            <text:p> 12:00</text:p>
            <text:p> 6:00</text:p>
            <text:p/>
          </table:table-cell>
          <table:table-cell office:value-type="string" calcext:value-type="string">
            <text:p> 12:00</text:p>
            <text:p/>
          </table:table-cell>
          <table:table-cell office:value-type="string" calcext:value-type="string">
            <text:p> 12:00</text:p>
            <text:p/>
          </table:table-cell>
          <table:table-cell office:value-type="string" calcext:value-type="string">
            <text:p>12:00</text:p>
            <text:p/>
          </table:table-cell>
          <table:table-cell office:value-type="string" calcext:value-type="string">
            <text:p> 12:00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W</text:p>
          </table:table-cell>
          <table:table-cell office:value-type="string" calcext:value-type="string">
            <text:p>ESPERANZA GFA   </text:p>
            <text:p>  9518 Anderson Mill Rd Ste G, 2nd Floor suite G, Austin 78729 </text:p>
          </table:table-cell>
          <table:table-cell table:number-columns-repeated="2"/>
          <table:table-cell office:value-type="string" calcext:value-type="string">
            <text:p>6:00 E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W</text:p>
          </table:table-cell>
          <table:table-cell office:value-type="string" calcext:value-type="string">
            <text:p>FAITH AFG   Bethany Methodist Church</text:p>
            <text:p>  10010 Anderson Mill Rd, Room D212 In The Disciple Building, Austin</text:p>
          </table:table-cell>
          <table:table-cell table:number-columns-repeated="4"/>
          <table:table-cell office:value-type="string" calcext:value-type="string">
            <text:p>7:30 Nc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COURAGE TO CHANGE AFG   St Marks Episcopal Church</text:p>
            <text:p>  2128 Barton Hills Dr, Austin 78704 </text:p>
          </table:table-cell>
          <table:table-cell/>
          <table:table-cell office:value-type="string" calcext:value-type="string">
            <text:p>6:45</text:p>
            <text:p/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DISCOVERING CHOICES AFG   </text:p>
            <text:p>  617 Clifford Dr., Austin 78745 </text:p>
          </table:table-cell>
          <table:table-cell table:number-columns-repeated="4"/>
          <table:table-cell office:value-type="string" calcext:value-type="string">
            <text:p>12:00 Wo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DOCE PASO AFG   San Francisco de Asis Episcopal Church</text:p>
            <text:p>  7000 Woodhue Dr, Austin 78745 </text:p>
          </table:table-cell>
          <table:table-cell table:number-columns-repeated="4"/>
          <table:table-cell office:value-type="string" calcext:value-type="string">
            <text:p>6:00 E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LET IT BEGIN WITH ME AFG   Alpha Behavioral Health Building</text:p>
            <text:p>  2416 South Lamar Blvd, Austin 78704 </text:p>
          </table:table-cell>
          <table:table-cell office:value-type="string" calcext:value-type="string">
            <text:p>6:00 Z</text:p>
            <text:p/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LIVING GRATITUDE AFG   Abiding Love Lutheran Church</text:p>
            <text:p>  7210 Brush Country Rd, Austin 78749 </text:p>
          </table:table-cell>
          <table:table-cell table:number-columns-repeated="2"/>
          <table:table-cell office:value-type="string" calcext:value-type="string">
            <text:p>7:00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NUEVA VISION GFA   Telephone Meeting Only - No In-Person Meeting</text:p>
            <text:p>  617 Clifford Dr, Austin 78745 </text:p>
          </table:table-cell>
          <table:table-cell table:number-columns-repeated="3"/>
          <table:table-cell office:value-type="string" calcext:value-type="string">
            <text:p>6:30 E</text:p>
            <text:p/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PERSONAL FREEDOM AFG   Abiding Love Lutheran Church</text:p>
            <text:p>  7210 Brush Country Road, Austin 78749 </text:p>
          </table:table-cell>
          <table:table-cell table:number-columns-repeated="4"/>
          <table:table-cell office:value-type="string" calcext:value-type="string">
            <text:p>6:00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ERENITY SEEKERS AFG   Shepherd of the Hills Presbyterian Church</text:p>
            <text:p>  5226 W. William Cannon Drive, Austin 78749 </text:p>
          </table:table-cell>
          <table:table-cell table:number-columns-repeated="5"/>
          <table:table-cell office:value-type="string" calcext:value-type="string">
            <text:p>6:00 Nc</text:p>
            <text:p/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PIRITUAL AWAKENINGS AFG   Bethany Lutheran Church</text:p>
            <text:p>  3701 W Slaughter Ln, Austin 78749 </text:p>
          </table:table-cell>
          <table:table-cell/>
          <table:table-cell office:value-type="string" calcext:value-type="string">
            <text:p>12:00</text:p>
            <text:p/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UNITY AFG   Living Faith AA Club</text:p>
            <text:p>  617 Clifford Dr, Austin 78745 </text:p>
          </table:table-cell>
          <table:table-cell table:number-columns-repeated="3"/>
          <table:table-cell office:value-type="string" calcext:value-type="string">
            <text:p> 7:00</text:p>
            <text:p/>
          </table:table-cell>
          <table:table-cell table:number-columns-repeated="2"/>
          <table:table-cell office:value-type="string" calcext:value-type="string">
            <text:p>10:00am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WOMEN IN RECOVERY AFG   Living Faith</text:p>
            <text:p>  617 Clifford Dr, Austin 78745 </text:p>
          </table:table-cell>
          <table:table-cell/>
          <table:table-cell office:value-type="string" calcext:value-type="string">
            <text:p>7:00 Wo</text:p>
            <text:p/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BEE CAVES ROAD AFG   Westlake United Methodist Church</text:p>
            <text:p>  1460 Redbud Trl, West Lake Hills 78746 </text:p>
          </table:table-cell>
          <table:table-cell table:number-columns-repeated="5"/>
          <table:table-cell office:value-type="string" calcext:value-type="string">
            <text:p>12:00</text:p>
            <text:p/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BRIDGE TO SHORE AFG   Riverbend Church</text:p>
            <text:p>  4214 N Capital Of Texas, Austin 78746 </text:p>
          </table:table-cell>
          <table:table-cell office:value-type="string" calcext:value-type="string">
            <text:p>5:45</text:p>
            <text:p/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HIGHLANDERS AFG   The Church at Highland Park</text:p>
            <text:p>  5206 Balcones Dr, Austin 78731 </text:p>
          </table:table-cell>
          <table:table-cell table:number-columns-repeated="3"/>
          <table:table-cell office:value-type="string" calcext:value-type="string">
            <text:p>12:30</text:p>
            <text:p/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</text:p>
          </table:table-cell>
          <table:table-cell office:value-type="string" calcext:value-type="string">
            <text:p>WESTLAKE AFG   Timberline Office Park</text:p>
            <text:p>  2525 Wallingwood Dr, Suite 703, Austin 78746 </text:p>
          </table:table-cell>
          <table:table-cell office:value-type="string" calcext:value-type="string">
            <text:p>5:30 Z</text:p>
            <text:p> 4:30</text:p>
            <text:p/>
          </table:table-cell>
          <table:table-cell office:value-type="string" calcext:value-type="string">
            <text:p> 8:00</text:p>
            <text:p/>
          </table:table-cell>
          <table:table-cell/>
          <table:table-cell office:value-type="string" calcext:value-type="string">
            <text:p> 12:00</text:p>
            <text:p/>
          </table:table-cell>
          <table:table-cell table:number-columns-repeated="2"/>
          <table:table-cell office:value-type="string" calcext:value-type="string">
            <text:p> 12:00</text:p>
            <text:p/>
          </table:table-cell>
          <table:table-cell table:number-columns-repeated="16375"/>
        </table:table-row>
        <table:table-row table:style-name="ro5">
          <table:table-cell/>
          <table:table-cell office:value-type="string" calcext:value-type="string">
            <text:p>AL-ANON GROUPS OUTSIDE OF AUSTI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U</text:p>
          </table:table-cell>
          <table:table-cell office:value-type="string" calcext:value-type="string">
            <text:p>BUDA UNITY AFG   Hays Hills Baptist Church</text:p>
            <text:p>  1401 FM-1626, Buda 78610 </text:p>
          </table:table-cell>
          <table:table-cell table:number-columns-repeated="2"/>
          <table:table-cell office:value-type="string" calcext:value-type="string">
            <text:p>6:30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</text:p>
          </table:table-cell>
          <table:table-cell office:value-type="string" calcext:value-type="string">
            <text:p>KEEP IT SIMPLE AFG   Buda Methodist Church</text:p>
            <text:p>  208 San Antonio St., Buda 78610 </text:p>
          </table:table-cell>
          <table:table-cell table:number-columns-repeated="2"/>
          <table:table-cell office:value-type="string" calcext:value-type="string">
            <text:p>7:00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</text:p>
          </table:table-cell>
          <table:table-cell office:value-type="string" calcext:value-type="string">
            <text:p>SERENITY SEEKERS BUDA AFG   St Elizabeth Episcopal Church</text:p>
            <text:p>  725 Fm 967, Buda 78610 </text:p>
          </table:table-cell>
          <table:table-cell table:number-columns-repeated="6"/>
          <table:table-cell office:value-type="string" calcext:value-type="string">
            <text:p>10:30am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S</text:p>
          </table:table-cell>
          <table:table-cell office:value-type="string" calcext:value-type="string">
            <text:p>DRIPPING SPRINGS AFG   Dripping Springs United Methodist Church</text:p>
            <text:p>  28900 Ranch Road 12, Dripping Springs 78620 </text:p>
          </table:table-cell>
          <table:table-cell table:number-columns-repeated="4"/>
          <table:table-cell office:value-type="string" calcext:value-type="string">
            <text:p>12:00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S</text:p>
          </table:table-cell>
          <table:table-cell office:value-type="string" calcext:value-type="string">
            <text:p>LET IT BEGIN WITH ME AFG   Dripping Springs Presbyterian Church</text:p>
            <text:p>  26650 Ranch Road 12, Dripping Springs 78620 </text:p>
          </table:table-cell>
          <table:table-cell table:number-columns-repeated="2"/>
          <table:table-cell office:value-type="string" calcext:value-type="string">
            <text:p> 5:30 Z</text:p>
            <text:p/>
          </table:table-cell>
          <table:table-cell table:number-columns-repeated="2"/>
          <table:table-cell office:value-type="string" calcext:value-type="string">
            <text:p>12:15 Wo Z</text:p>
            <text:p/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GEORGETOWN WEST AFG   Georgetown Church Of Christ</text:p>
            <text:p>  1525 W University Ave, Georgetown 78628 </text:p>
          </table:table-cell>
          <table:table-cell table:number-columns-repeated="6"/>
          <table:table-cell office:value-type="string" calcext:value-type="string">
            <text:p>11:00am Nc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LIVING SOLUTION AFG   Horizon House</text:p>
            <text:p>  216 E. 10th St., Georgetown 78626 </text:p>
          </table:table-cell>
          <table:table-cell table:number-columns-repeated="4"/>
          <table:table-cell office:value-type="string" calcext:value-type="string">
            <text:p>7:00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PROGRESS NOT PERFECTION AFG   Georgetown Church of Christ</text:p>
            <text:p>  1525 W University Avenue, Georgetown 78633 </text:p>
          </table:table-cell>
          <table:table-cell table:number-columns-repeated="2"/>
          <table:table-cell office:value-type="string" calcext:value-type="string">
            <text:p>7:00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</text:p>
          </table:table-cell>
          <table:table-cell office:value-type="string" calcext:value-type="string">
            <text:p>CAME TO BELIEVE AFG   Yellow House</text:p>
            <text:p>  804 Leander Dr., Leander 78641 </text:p>
          </table:table-cell>
          <table:table-cell table:number-columns-repeated="2"/>
          <table:table-cell office:value-type="string" calcext:value-type="string">
            <text:p> 6:15</text:p>
            <text:p/>
          </table:table-cell>
          <table:table-cell/>
          <table:table-cell office:value-type="string" calcext:value-type="string">
            <text:p>6:15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</text:p>
          </table:table-cell>
          <table:table-cell office:value-type="string" calcext:value-type="string">
            <text:p>HOPE AFG   The Yellow House Foundation</text:p>
            <text:p>  804 Leander Dr City, Leander 78641 </text:p>
          </table:table-cell>
          <table:table-cell office:value-type="string" calcext:value-type="string">
            <text:p> 1:00</text:p>
            <text:p/>
          </table:table-cell>
          <table:table-cell table:number-columns-repeated="5"/>
          <table:table-cell office:value-type="string" calcext:value-type="string">
            <text:p>10:30am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T</text:p>
          </table:table-cell>
          <table:table-cell office:value-type="string" calcext:value-type="string">
            <text:p>BEE CAVE PARENT AFG   Presbyterian Church of Lake Travis</text:p>
            <text:p>  14820 Hamilton Pool Rd, Travis 78738 </text:p>
          </table:table-cell>
          <table:table-cell table:number-columns-repeated="3"/>
          <table:table-cell office:value-type="string" calcext:value-type="string">
            <text:p>6:30</text:p>
            <text:p/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V</text:p>
          </table:table-cell>
          <table:table-cell office:value-type="string" calcext:value-type="string">
            <text:p>THE LAST RESORT AFG   Rolling Hills Community Church</text:p>
            <text:p>  20103 Dawn Dr., Lago Vista 78645 </text:p>
          </table:table-cell>
          <table:table-cell table:number-columns-repeated="4"/>
          <table:table-cell office:value-type="string" calcext:value-type="string">
            <text:p>6:30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LAKE TRAVIS PARENTS AFG   Lake Travis United Methodist Church</text:p>
            <text:p>  1502 Ranch Rd. 620 N, Activities Center Building, Lakeway 78734 </text:p>
          </table:table-cell>
          <table:table-cell/>
          <table:table-cell office:value-type="string" calcext:value-type="string">
            <text:p>7:00 Z</text:p>
            <text:p/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LAKEWAY TUESDAY NOON AFG   Lake Travis United Methodist Church</text:p>
            <text:p>  1502 Ranch Rd 620N, Lakeway 78734 </text:p>
          </table:table-cell>
          <table:table-cell table:number-columns-repeated="2"/>
          <table:table-cell office:value-type="string" calcext:value-type="string">
            <text:p>12:00</text:p>
            <text:p/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F</text:p>
          </table:table-cell>
          <table:table-cell office:value-type="string" calcext:value-type="string">
            <text:p>PATH TO SERENITY AFG   </text:p>
            <text:p>  902 Old Austin Hutto Road, Ste 400, Pflugerville 78660 </text:p>
          </table:table-cell>
          <table:table-cell table:number-columns-repeated="2"/>
          <table:table-cell office:value-type="string" calcext:value-type="string">
            <text:p>7:30 Nc</text:p>
            <text:p> 7:15 Nc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</text:p>
          </table:table-cell>
          <table:table-cell office:value-type="string" calcext:value-type="string">
            <text:p>PFLUGA PFAM AFG   St. Elizabeth</text:p>
            <text:p>  1520 N Railroad Ave, Pflugerville 78660 </text:p>
          </table:table-cell>
          <table:table-cell table:number-columns-repeated="6"/>
          <table:table-cell office:value-type="string" calcext:value-type="string">
            <text:p>10:00am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COURAGE TO CHANGE AFG   Grace Presbyterian Church</text:p>
            <text:p>  1705 Gattis School Rd, Round Rock 78664 </text:p>
          </table:table-cell>
          <table:table-cell table:number-columns-repeated="4"/>
          <table:table-cell office:value-type="string" calcext:value-type="string">
            <text:p>7:00 Z</text:p>
            <text:p/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FREEDOM TO RECOVER AFG   Round Rock Presbyterian Church</text:p>
            <text:p>  4010 Sam Bass Rd, 4010 Sam Bass Rd, Round Rock 78681 </text:p>
          </table:table-cell>
          <table:table-cell table:number-columns-repeated="3"/>
          <table:table-cell office:value-type="string" calcext:value-type="string">
            <text:p>7:00 Z</text:p>
            <text:p/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HOPE AND SERENITY AFG   Grace Presbyterian Church</text:p>
            <text:p>  1705 Gattis School Rd, Round Rock 78664 </text:p>
          </table:table-cell>
          <table:table-cell table:number-columns-repeated="2"/>
          <table:table-cell office:value-type="string" calcext:value-type="string">
            <text:p>7:00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SEEKERS OF SERENITY AFG   Grace Presbyterian Church</text:p>
            <text:p>  1705 Gattis School Rd, Round Rock 78664 </text:p>
          </table:table-cell>
          <table:table-cell table:number-columns-repeated="2"/>
          <table:table-cell office:value-type="string" calcext:value-type="string">
            <text:p>12:00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SERENITY TRAIL AFG   Wernecke Grace House</text:p>
            <text:p>  710 Bluff Dr, Round Rock 78681 </text:p>
          </table:table-cell>
          <table:table-cell table:number-columns-repeated="5"/>
          <table:table-cell office:value-type="string" calcext:value-type="string">
            <text:p>7:30</text:p>
            <text:p/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CAMINO A LA SERENIDAD GFA   Temporarily Closed</text:p>
            <text:p>  Member's Home, 120B Commercial Pkwy, Temple 76504 </text:p>
          </table:table-cell>
          <table:table-cell/>
          <table:table-cell office:value-type="string" calcext:value-type="string">
            <text:p>4:30 E</text:p>
            <text:p/>
          </table:table-cell>
          <table:table-cell table:number-columns-repeated="4"/>
          <table:table-cell office:value-type="string" calcext:value-type="string">
            <text:p> 3:00 E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ZM</text:p>
          </table:table-cell>
          <table:table-cell office:value-type="string" calcext:value-type="string">
            <text:p>HOPE AND COURAGE AFG   Zoom</text:p>
            <text:p>   99999 </text:p>
          </table:table-cell>
          <table:table-cell table:number-columns-repeated="6"/>
          <table:table-cell office:value-type="string" calcext:value-type="string">
            <text:p>10:30am Z</text:p>
            <text:p/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ZM</text:p>
          </table:table-cell>
          <table:table-cell office:value-type="string" calcext:value-type="string">
            <text:p>HOPE IN RECOVERY AFG   Zoom</text:p>
            <text:p>   99999 </text:p>
          </table:table-cell>
          <table:table-cell/>
          <table:table-cell office:value-type="string" calcext:value-type="string">
            <text:p> 12:00 Z</text:p>
            <text:p/>
          </table:table-cell>
          <table:table-cell table:number-columns-repeated="3"/>
          <table:table-cell office:value-type="string" calcext:value-type="string">
            <text:p>12:00 Z</text:p>
            <text:p/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s/>list created Jul 07 2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ws meetings 25 miles of central Austin 78705.</text:p>
          </table:table-cell>
          <table:table-cell table:number-columns-repeated="16382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new.A32:new.XFD5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left="0.2in" fo:margin-right="0.2in" style:scale-to="72%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size="14pt"/>
    </style:style>
    <style:style style:name="MT3" style:family="text">
      <style:text-properties fo:font-size="14pt" fo:font-weight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9" style:family="text">
      <style:text-properties fo:font-size="12pt"/>
    </style:style>
    <style:style style:name="MT10" style:family="text">
      <style:text-properties fo:font-size="12pt" fo:font-weight="bold"/>
    </style:style>
  </office:automatic-styles>
  <office:master-styles>
    <style:master-page style:name="Default" style:page-layout-name="Mpm1">
      <style:header/>
      <style:header-left style:display="false"/>
      <style:header-first>
        <text:p><text:span text:style-name="MT1">Greater Austin Al-Anon Meeting List <text:s/>(June 2026)</text:span></text:p>
      </style:header-first>
      <style:footer>
        <style:region-left>
          <text:p><text:span text:style-name="MT2">A printable file (PDF) of this list is available at </text:span><text:span text:style-name="MT3">https://myalanon.github.io</text:span></text:p>
          <text:p><text:span text:style-name="MT3"/></text:p>
          <text:p><text:span text:style-name="MT4">The Austin Al-Anon Alateen Information Center is at 6301 Menchaca Rd, Ste F, Austin Tx 78745. <text:s/>Phone 512-441-8591 <text:s/>(hours may vary, please call ahead).</text:span></text:p>
          <text:p><text:span text:style-name="MT4"/></text:p>
          <text:p><text:span text:style-name="MT2">This is not an official publication of Al-Anon or any of its groups. <text:s/>Some details have been omitted for brevity. <text:s/>For complete</text:span></text:p>
          <text:p><text:span text:style-name="MT2">meeting information see the Al-Anon website </text:span><text:span text:style-name="MT3">https://al-anon.org/al-anon-meetings</text:span></text:p>
          <text:p><text:span text:style-name="MT3"/></text:p>
        </style:region-left>
      </style:footer>
      <style:footer-left style:display="false"/>
      <style:footer-first>
        <style:region-left>
          <text:p><text:span text:style-name="MT5">Wo</text:span><text:span text:style-name="MT6"> = Women only, <text:s/></text:span><text:span text:style-name="MT5">Mo</text:span><text:span text:style-name="MT6"> = Men only, </text:span><text:span text:style-name="MT5">G</text:span><text:span text:style-name="MT6"> <text:s/>= LGBT friendly, </text:span><text:span text:style-name="MT5">E </text:span><text:span text:style-name="MT7">= Espa</text:span><text:span text:style-name="MT8">ň</text:span><text:span text:style-name="MT9">ol, <text:s/></text:span><text:span text:style-name="MT10">Nc</text:span><text:span text:style-name="MT9"> = Newcomers, <text:s/></text:span></text:p>
          <text:p><text:span text:style-name="MT10">Z</text:span><text:span text:style-name="MT9"> = Zoom available. See the Al-Anon website for this meeting's zoom details.</text:span></text:p>
          <text:p><text:span text:style-name="MT9"/></text:p>
          <text:p><text:span text:style-name="MT9">AREA: C=central Austin, N=North, S=South, etc. (based on zip code).</text:span></text:p>
        </style:region-lef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7-22T10:57:28.436000000</dc:date>
    <meta:editing-duration>PT1H38M46S</meta:editing-duration>
    <meta:editing-cycles>17</meta:editing-cycles>
    <meta:generator>LibreOffice/7.4.5.1$Windows_X86_64 LibreOffice_project/9c0871452b3918c1019dde9bfac75448afc4b57f</meta:generator>
    <meta:print-date>2026-07-22T10:58:14.559000000</meta:print-date>
    <meta:document-statistic meta:table-count="1" meta:cell-count="196" meta:object-count="0"/>
  </office:meta>
</office:document-meta>
</file>